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xmlns:draw="urn:oasis:names:tc:opendocument:xmlns:drawing:1.0" office:version="1.2">
  <office:automatic-styles>
    <style:style style:name="Name" style:family="paragraph">
      <style:paragraph-properties fo:margin-bottom="0.05cm"/>
      <style:text-properties fo:font-weight="bold" fo:font-size="20pt" fo:color="#151922"/>
    </style:style>
    <style:style style:name="Title" style:family="paragraph">
      <style:paragraph-properties fo:margin-bottom="0.1cm"/>
      <style:text-properties fo:font-weight="bold" fo:font-size="11pt" fo:color="#0ea5e9"/>
    </style:style>
    <style:style style:name="Contact" style:family="paragraph">
      <style:paragraph-properties fo:margin-bottom="0.15cm"/>
      <style:text-properties fo:font-size="9pt" fo:color="#5b6474"/>
    </style:style>
    <style:style style:name="Rule" style:family="paragraph">
      <style:paragraph-properties fo:border-bottom="0.06cm solid #0ea5e9" fo:padding-bottom="0.02cm" fo:margin-bottom="0.18cm"/>
      <style:text-properties fo:font-size="2pt"/>
    </style:style>
    <style:style style:name="Metrics" style:family="paragraph">
      <style:paragraph-properties fo:margin-bottom="0.2cm"/>
      <style:text-properties fo:font-size="10pt" fo:color="#151922"/>
    </style:style>
    <style:style style:name="H" style:family="paragraph">
      <style:paragraph-properties fo:margin-top="0.32cm" fo:margin-bottom="0.1cm" fo:border-bottom="0.02cm solid #0ea5e9" fo:padding-bottom="0.04cm"/>
      <style:text-properties fo:font-weight="bold" fo:font-size="11pt" fo:color="#0ea5e9" fo:letter-spacing="0.03cm"/>
    </style:style>
    <style:style style:name="Sub" style:family="paragraph">
      <style:paragraph-properties fo:margin-top="0.1cm" fo:margin-bottom="0.03cm">
        <style:tab-stops>
          <style:tab-stop style:position="17cm" style:type="right"/>
        </style:tab-stops>
      </style:paragraph-properties>
      <style:text-properties fo:font-size="10.5pt" fo:color="#151922"/>
    </style:style>
    <style:style style:name="P" style:family="paragraph">
      <style:paragraph-properties fo:margin-bottom="0.1cm"/>
      <style:text-properties fo:font-size="10pt" fo:color="#151922"/>
    </style:style>
    <style:style style:name="PI" style:family="paragraph">
      <style:paragraph-properties fo:margin-bottom="0.08cm"/>
      <style:text-properties fo:font-size="10pt" fo:font-style="italic" fo:color="#5b6474"/>
    </style:style>
    <style:style style:name="Skills" style:family="paragraph">
      <style:paragraph-properties fo:margin-bottom="0.08cm"/>
      <style:text-properties fo:font-size="9.5pt" fo:color="#151922"/>
    </style:style>
    <style:style style:name="Pub" style:family="paragraph">
      <style:paragraph-properties fo:margin-bottom="0.08cm" fo:margin-left="0.7cm" fo:text-indent="-0.7cm"/>
      <style:text-properties fo:font-size="10pt" fo:color="#151922"/>
    </style:style>
    <style:style style:name="Li" style:family="paragraph">
      <style:paragraph-properties fo:margin-bottom="0.03cm"/>
      <style:text-properties fo:font-size="10pt" fo:color="#151922"/>
    </style:style>
    <style:style style:name="tBold" style:family="text">
      <style:text-properties fo:font-weight="bold" fo:color="#151922"/>
    </style:style>
    <style:style style:name="tAccent" style:family="text">
      <style:text-properties fo:color="#0ea5e9"/>
    </style:style>
    <style:style style:name="tAccentB" style:family="text">
      <style:text-properties fo:font-weight="bold" fo:color="#0ea5e9"/>
    </style:style>
    <style:style style:name="tSoft" style:family="text">
      <style:text-properties fo:color="#5b6474"/>
    </style:style>
    <style:style style:name="tValue" style:family="text">
      <style:text-properties fo:font-weight="bold" fo:font-size="12pt" fo:color="#151922"/>
    </style:style>
    <style:style style:name="tLabel" style:family="text">
      <style:text-properties fo:font-size="8.5pt" fo:color="#5b6474"/>
    </style:style>
    <text:list-style style:name="L1">
      <text:list-level-style-bullet text:level="1" text:bullet-char="•">
        <style:list-level-properties text:space-before="0.3cm" text:min-label-width="0.35cm"/>
      </text:list-level-style-bullet>
    </text:list-style>
  </office:automatic-styles>
  <office:body>
    <office:text>
      <text:p text:style-name="Name">Sourabh Bhaumik</text:p>
      <text:p text:style-name="Title">Founder &amp; CEO | IT Services, Field Operations &amp; AI Transformation</text:p>
      <text:p text:style-name="Contact">Kolkata, West Bengal, India  |  srksourabh@gmail.com  |  +91 98367 19911  |  linkedin.com/in/srksourabh  |  sourabhbhaumik.com</text:p>
      <text:p text:style-name="Rule"/>
      <text:p text:style-name="Metrics"><text:span text:style-name="tValue">₹10 Cr+ </text:span><text:span text:style-name="tLabel">Turnover built at UDS</text:span><text:span text:style-name="tSoft">    </text:span><text:span text:style-name="tValue">15+ yrs </text:span><text:span text:style-name="tLabel">Founding &amp; operating</text:span><text:span text:style-name="tSoft">    </text:span><text:span text:style-name="tValue">Pan-India </text:span><text:span text:style-name="tLabel">Multi-state delivery</text:span><text:span text:style-name="tSoft">    </text:span><text:span text:style-name="tValue">~150 </text:span><text:span text:style-name="tLabel">Field &amp; tech workforce</text:span></text:p>
      <text:p text:style-name="H">SUMMARY</text:p>
      <text:p text:style-name="P">Founder and serial entrepreneur who built Ultimate Digital Solutions (UDS) into a ₹10 crore-plus, multi-domain IT services and field-operations company spanning system integration, data-centre O&amp;M, POS deployment, e-governance and digital transformation. Two decades across IT, telecom and operations — from enterprise sales at Aircel, Reliance and HCL to running pan-India delivery with a ~150-strong field workforce. Today focused on applying AI to modernise field-heavy service businesses, while backing ventures in mobility, creative production and social impact.</text:p>
      <text:p text:style-name="H">EXPERIENCE</text:p>
      <text:p text:style-name="Sub"><text:span text:style-name="tBold">Founder &amp; CEO / Managing Director</text:span><text:span text:style-name="tAccent">  ·  Ultimate Digital Solutions Pvt. Ltd. (UDS)</text:span><text:tab/><text:span text:style-name="tSoft">2009 – Present</text:span></text:p>
      <text:p text:style-name="PI">Kolkata, India  ·  IT services · system integration · field operations · POS · data-centre O&amp;M · e-governance</text:p>
      <text:list text:style-name="L1">
        <text:list-item>
          <text:p text:style-name="Li">Founded and scaled UDS into a ₹10 crore-plus, multi-service IT and operations company spanning system integration, data-centre O&amp;M, POS deployment, field manpower, e-governance and digital transformation.</text:p>
        </text:list-item>
        <text:list-item>
          <text:p text:style-name="Li">Grew a ~150-strong field and technical delivery workforce and built pan-India operations across multiple Indian states.</text:p>
        </text:list-item>
        <text:list-item>
          <text:p text:style-name="Li">Won and served 20+ enterprise and government clients, owning proposals, sales, pricing and strategic partnerships end to end.</text:p>
        </text:list-item>
        <text:list-item>
          <text:p text:style-name="Li">Directed large-scale government-linked digitisation deployments mobilising 1,000+ field resources with SLA-bound execution.</text:p>
        </text:list-item>
        <text:list-item>
          <text:p text:style-name="Li">Conceptualised 2 operational SaaS products — FieldConnect and PosBuddy — to digitise engineer tracking, stock movement and POS service management.</text:p>
        </text:list-item>
        <text:list-item>
          <text:p text:style-name="Li">Leading AI-transformation planning to automate MIS, dispatch and support across 5+ service lines.</text:p>
        </text:list-item>
      </text:list>
      <text:p text:style-name="Sub"><text:span text:style-name="tBold">Founder &amp; Director</text:span><text:span text:style-name="tAccent">  ·  Golden Frame Talkies</text:span><text:tab/><text:span text:style-name="tSoft">Present</text:span></text:p>
      <text:p text:style-name="PI">Kolkata, India  ·  Theatre · storytelling · creative production</text:p>
      <text:list text:style-name="L1">
        <text:list-item>
          <text:p text:style-name="Li">Founded a theatre and storytelling venture, directing and writing stage productions that blend classical theatre with contemporary narratives.</text:p>
        </text:list-item>
      </text:list>
      <text:p text:style-name="Sub"><text:span text:style-name="tBold">Founder &amp; Chairman</text:span><text:span text:style-name="tAccent">  ·  Project Paco Foundation</text:span><text:tab/><text:span text:style-name="tSoft">2021 – Present</text:span></text:p>
      <text:p text:style-name="PI">Kolkata, India  ·  Social impact · youth education · community</text:p>
      <text:list text:style-name="L1">
        <text:list-item>
          <text:p text:style-name="Li">Founded a registered Section-8 non-profit (est. 2021) supporting youth education and development programmes.</text:p>
        </text:list-item>
      </text:list>
      <text:p text:style-name="Sub"><text:span text:style-name="tBold">Founder &amp; Director</text:span><text:span text:style-name="tAccent">  ·  AAOcab</text:span><text:tab/><text:span text:style-name="tSoft">Present</text:span></text:p>
      <text:p text:style-name="PI">Kolkata, India  ·  Mobility · outstation travel services</text:p>
      <text:list text:style-name="L1">
        <text:list-item>
          <text:p text:style-name="Li">Launched a human-assisted outstation cab service with phone/WhatsApp booking for families, patients and non-app users, emphasising driver welfare and passenger safety.</text:p>
        </text:list-item>
      </text:list>
      <text:p text:style-name="Sub"><text:span text:style-name="tBold">Executive — Enterprise / WiMAX Solutions</text:span><text:span text:style-name="tAccent">  ·  Aircel</text:span><text:tab/><text:span text:style-name="tSoft">Earlier career</text:span></text:p>
      <text:p text:style-name="PI">Kolkata, India</text:p>
      <text:p text:style-name="Sub"><text:span text:style-name="tBold">Corporate Sales Executive</text:span><text:span text:style-name="tAccent">  ·  Reliance Communications</text:span><text:tab/><text:span text:style-name="tSoft">Earlier career</text:span></text:p>
      <text:p text:style-name="PI">Kolkata, India</text:p>
      <text:p text:style-name="Sub"><text:span text:style-name="tBold">Executive</text:span><text:span text:style-name="tAccent">  ·  HCL Infosystems</text:span><text:tab/><text:span text:style-name="tSoft">Earlier career</text:span></text:p>
      <text:p text:style-name="PI">Kolkata, India</text:p>
      <text:p text:style-name="H">PRODUCTS &amp; CONCEPTS</text:p>
      <text:p text:style-name="Sub"><text:span text:style-name="tBold">FieldConnect</text:span><text:span text:style-name="tAccent">  —  Field operations management</text:span></text:p>
      <text:p text:style-name="P">Field engineer tracking · Call assignment · Stock movement · Attendance &amp; reporting · Operational MIS · Client-facing transparency</text:p>
      <text:p text:style-name="Sub"><text:span text:style-name="tBold">PosBuddy</text:span><text:span text:style-name="tAccent">  —  POS service management</text:span></text:p>
      <text:p text:style-name="P">POS device stock tracking · Install &amp; service calls · Engineer allocation · Merchant support flow · Service reporting &amp; MIS</text:p>
      <text:p text:style-name="H">ACHIEVEMENTS</text:p>
      <text:list text:style-name="L1">
        <text:list-item>
          <text:p text:style-name="Li">Founded and scaled Ultimate Digital Solutions to a ₹10 crore-plus turnover business within its early growth phase.</text:p>
        </text:list-item>
        <text:list-item>
          <text:p text:style-name="Li">Built pan-India service capability across multiple Indian states with a ~150-person field and technical workforce.</text:p>
        </text:list-item>
        <text:list-item>
          <text:p text:style-name="Li">Delivered government-linked digitisation programmes mobilising thousands of field resources under strict SLAs.</text:p>
        </text:list-item>
        <text:list-item>
          <text:p text:style-name="Li">Won 20+ enterprise and government accounts across POS, data-centre O&amp;M and e-governance.</text:p>
        </text:list-item>
        <text:list-item>
          <text:p text:style-name="Li">Conceptualised FieldConnect and PosBuddy — SaaS products for field-operations and POS service management.</text:p>
        </text:list-item>
        <text:list-item>
          <text:p text:style-name="Li">Launched three ventures and one registered non-profit across IT, mobility, creative production and social impact.</text:p>
        </text:list-item>
        <text:list-item>
          <text:p text:style-name="Li">Scored 84% in the SAP ABAP certification (2008) — cited as one of the highest in India at the time.</text:p>
        </text:list-item>
        <text:list-item>
          <text:p text:style-name="Li">Summited Annapurna Base Camp (4,130 m) in October 2023.</text:p>
        </text:list-item>
      </text:list>
      <text:p text:style-name="H">CORE COMPETENCIES</text:p>
      <text:p text:style-name="Skills"><text:span text:style-name="tAccentB">business leadership:  </text:span>Entrepreneurship  ·  Business strategy  ·  Company building  ·  P&amp;L ownership  ·  Revenue growth  ·  Market expansion  ·  Strategic partnerships  ·  Enterprise client management  ·  Negotiation  ·  Vendor management</text:p>
      <text:p text:style-name="Skills"><text:span text:style-name="tAccentB">operations management:  </text:span>Field operations  ·  Pan-India manpower deployment  ·  Service delivery  ·  POS rollout &amp; support  ·  SLA management  ·  Data-centre O&amp;M  ·  Multi-state execution  ·  Inventory &amp; stock tracking  ·  MIS &amp; reporting</text:p>
      <text:p text:style-name="Skills"><text:span text:style-name="tAccentB">technology and ai:  </text:span>IT services  ·  System integration  ·  Cloud computing  ·  Digital transformation  ·  AI adoption  ·  Business-process automation  ·  Cybersecurity awareness  ·  SaaS product ideation  ·  CRM integration  ·  Data management</text:p>
      <text:p text:style-name="Skills"><text:span text:style-name="tAccentB">product and innovation:  </text:span>Product concept development  ·  SaaS planning  ·  Field-operations software  ·  POS management software  ·  MVP planning  ·  Service-to-product conversion  ·  Customer-journey design  ·  AI-enabled operations</text:p>
      <text:p text:style-name="Skills"><text:span text:style-name="tAccentB">sales and marketing:  </text:span>Enterprise B2B sales  ·  Proposal &amp; bid writing  ·  Client acquisition  ·  Service positioning  ·  Pitch decks  ·  Investor communication  ·  Market research</text:p>
      <text:p text:style-name="H">EDUCATION</text:p>
      <text:p text:style-name="Sub"><text:span text:style-name="tBold">B.Tech, Computer Science &amp; Engineering</text:span><text:span text:style-name="tAccent">  ·  West Bengal University of Technology (MAKAUT)</text:span></text:p>
      <text:p text:style-name="H">CERTIFICATIONS</text:p>
      <text:list text:style-name="L1">
        <text:list-item>
          <text:p text:style-name="Li">SAP Certified Consultant — ABAP (2008) — 84%</text:p>
        </text:list-item>
      </text:list>
      <text:p text:style-name="H">AWARDS</text:p>
      <text:list text:style-name="L1">
        <text:list-item>
          <text:p text:style-name="Li">Top 50 Emerging Startup in India</text:p>
        </text:list-item>
        <text:list-item>
          <text:p text:style-name="Li">MSME Business Award — Bengal Chamber of Commerce &amp; Industry</text:p>
        </text:list-item>
        <text:list-item>
          <text:p text:style-name="Li">Leading SME of India — Dun &amp; Bradstreet (self-reported, 2014)</text:p>
        </text:list-item>
        <text:list-item>
          <text:p text:style-name="Li">SAP ABAP certification — 84% (2008)</text:p>
        </text:list-item>
      </text:list>
      <text:p text:style-name="H">MEMBERSHIPS</text:p>
      <text:p text:style-name="P">Bengal Chamber of Commerce &amp; Industry  ·  Newtown Business Club  ·  Servas International</text:p>
      <text:p text:style-name="H">LANGUAGES</text:p>
      <text:p text:style-name="P">English  ·  Hindi  ·  Bengali</text:p>
      <text:p text:style-name="H">INTERESTS</text:p>
      <text:p text:style-name="P">Theatre &amp; acting  ·  Photography  ·  Travel storytelling  ·  Film &amp; media  ·  Endurance trekking  ·  Community engag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default-style style:family="paragraph">
      <style:text-properties style:font-name="Liberation Sans" fo:font-size="10pt"/>
    </style:default-style>
  </office:styles>
  <office:automatic-styles>
    <style:page-layout style:name="pm1">
      <style:page-layout-properties fo:page-width="21cm" fo:page-height="29.7cm" fo:margin-top="1.4cm" fo:margin-bottom="1.4cm" fo:margin-left="1.5cm" fo:margin-right="1.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Premium Resume Studio</meta:generator>
  </office:meta>
</office:document-meta>
</file>